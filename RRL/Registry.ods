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5281/zenodo.15031111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lanog, V. C.; Paderan, M. J. D.; Adove, R. C. A.; Bathan, C. M. N.; Catibog, D. N.; Rivera, G. R.; Mangarin, J. A.</text:p>
          </table:table-cell>
          <table:table-cell office:value-type="string" calcext:value-type="string">
            <text:p>BUY NOW, PAY LATER: SHOPEE ONLINE STORE USERS EXPERIENCES ON SHOPEE PAY LATER FEATURE (SPAY LATER)</text:p>
          </table:table-cell>
          <table:table-cell office:value-type="string" calcext:value-type="string">
            <text:p>GUILD OF EDUCATORS IN TESOL INTERNATIONAL RESEARCH JOURN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3b8c2d1-4e5f-4a8b-9c7d-6e5f4a3b2c1d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rpizo, E.; Balitar, J.; Balila, J.</text:p>
          </table:table-cell>
          <table:table-cell office:value-type="string" calcext:value-type="string">
            <text:p>The Impact of AUP-CES Livelihood Initiatives, Leadership and Management in Buklod Bahayan</text:p>
          </table:table-cell>
          <table:table-cell office:value-type="string" calcext:value-type="string">
            <text:p>11th ISC 2024 (Universitas Advent Indonesia, Indonesia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5662/IJARCST.2025.0805004</text:p>
          </table:table-cell>
          <table:table-cell office:value-type="string" calcext:value-type="string">
            <text:p>Algorithm-specif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havana, B. R.; Pavan, D.; Guru Darshan, T. H.</text:p>
          </table:table-cell>
          <table:table-cell office:value-type="string" calcext:value-type="string">
            <text:p>AI-Based Wealth Advisory System using Machine Learning and Predictive Analytics for Personalized Budget Planning</text:p>
          </table:table-cell>
          <table:table-cell office:value-type="string" calcext:value-type="string">
            <text:p>International Journal of Advanced Research in Computer Science and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calcext:value-type="string">
            <text:p>2024 Report on the Status of Digital Payments in the Philippine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55248/geneqi.6.0525.1716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alhay, S. F.; Guevarra, C. M.; Bragas, C. M.</text:p>
          </table:table-cell>
          <table:table-cell office:value-type="string" calcext:value-type="string">
            <text:p>The Gig Economy: Financial Challenges and Opportunities Faced by Freelancers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, M.; Centeno, D.</text:p>
          </table:table-cell>
          <table:table-cell office:value-type="string" calcext:value-type="string">
            <text:p>Effects of Filipino Consumers' Financial Attitudes, Subjective Norms, and Perceived Behavioral Control on Intentions to Formal Banking: Towards Financial Inclusion</text:p>
          </table:table-cell>
          <table:table-cell office:value-type="string" calcext:value-type="string">
            <text:p>Philippine Management Review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, Althea Grace; R, Valerie Mae; G, Lazaro Bryan Louis</text:p>
          </table:table-cell>
          <table:table-cell office:value-type="string" calcext:value-type="string">
            <text:p>Navigating Financial Struggle: The Ripple Effect of Inflation Rates on Working Students</text:p>
          </table:table-cell>
          <table:table-cell office:value-type="string" calcext:value-type="string">
            <text:p>International Journal of Advanced Multidisciplinary Research and Stud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.i3.57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ela Torre, J. M. Y.; Jangao, J. P. P.; Maghilum, J. T.; Man-onan, R. J. H.; Pepito, S. G. Jr.; Rapirap, G. P. Jr.; Cervantes, J. Z.</text:p>
          </table:table-cell>
          <table:table-cell office:value-type="string" calcext:value-type="string">
            <text:p>The Impact of Personal Budgeting Skills on College Students' Financial Stability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146/annurev-financial-110921-013217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'Acunto, F.; Rossi, A. G.</text:p>
          </table:table-cell>
          <table:table-cell office:value-type="string" calcext:value-type="string">
            <text:p>Robo-Advice: Transforming Households into Rational Economic Agents</text:p>
          </table:table-cell>
          <table:table-cell office:value-type="string" calcext:value-type="string">
            <text:p>Annual Review of Financial Economi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3389/fsoe.2026.175200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Domingo, P.</text:p>
          </table:table-cell>
          <table:table-cell office:value-type="string" calcext:value-type="string">
            <text:p>Family dynamics in Filipino transnational families: the role of non-migrant mothers</text:p>
          </table:table-cell>
          <table:table-cell office:value-type="string" calcext:value-type="string">
            <text:p>Frontiers in Sociology</text:p>
          </table:table-cell>
          <table:table-cell table:number-columns-repeated="3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22:26:35.004363000</dc:date>
    <meta:editing-duration>PT7H39M16S</meta:editing-duration>
    <meta:editing-cycles>15</meta:editing-cycles>
    <meta:generator>LibreOffice/25.8.5.2$Windows_X86_64 LibreOffice_project/9c8b85f387cc00a89945a79c9e6239f32e450ac2</meta:generator>
    <meta:document-statistic meta:table-count="1" meta:cell-count="213" meta:object-count="0"/>
  </office:meta>
</office:document-meta>
</file>